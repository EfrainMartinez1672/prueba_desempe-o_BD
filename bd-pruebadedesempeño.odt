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1" style:family="table-row">
      <style:table-row-properties style:min-row-height="0.385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51cm" style:rel-column-width="16383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6*"/>
    </style:style>
    <style:style style:name="Tabla7.B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2" style:family="table-row">
      <style:table-row-properties style:min-row-height="0.75cm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6*"/>
    </style:style>
    <style:style style:name="Tabla8.C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E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11c3c"/>
    </style:style>
    <style:style style:name="P4" style:family="paragraph" style:parent-style-name="Heading_20_2">
      <style:paragraph-properties fo:text-align="center" style:justify-single-word="false"/>
      <style:text-properties officeooo:rsid="00011c3c" officeooo:paragraph-rsid="00011c3c"/>
    </style:style>
    <style:style style:name="P5" style:family="paragraph" style:parent-style-name="Heading_20_2">
      <style:paragraph-properties fo:text-align="center" style:justify-single-word="false"/>
      <style:text-properties officeooo:rsid="00026356" officeooo:paragraph-rsid="00026356"/>
    </style:style>
    <style:style style:name="P6" style:family="paragraph" style:parent-style-name="Heading_20_2">
      <style:paragraph-properties fo:text-align="center" style:justify-single-word="false"/>
      <style:text-properties officeooo:rsid="0003d955" officeooo:paragraph-rsid="0003d955"/>
    </style:style>
    <style:style style:name="P7" style:family="paragraph" style:parent-style-name="Heading_20_2">
      <style:text-properties officeooo:rsid="0004c4f4" officeooo:paragraph-rsid="0004c4f4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081f2b"/>
    </style:style>
    <style:style style:name="P11" style:family="paragraph" style:parent-style-name="Table_20_Contents">
      <style:paragraph-properties fo:text-align="center" style:justify-single-word="false"/>
      <style:text-properties officeooo:rsid="00011c3c" officeooo:paragraph-rsid="00011c3c"/>
    </style:style>
    <style:style style:name="P12" style:family="paragraph" style:parent-style-name="Table_20_Contents">
      <style:paragraph-properties fo:text-align="center" style:justify-single-word="false"/>
      <style:text-properties officeooo:rsid="00011c3c" officeooo:paragraph-rsid="00026356"/>
    </style:style>
    <style:style style:name="P13" style:family="paragraph" style:parent-style-name="Table_20_Contents">
      <style:paragraph-properties fo:text-align="center" style:justify-single-word="false"/>
      <style:text-properties officeooo:rsid="00011c3c" officeooo:paragraph-rsid="0003d955"/>
    </style:style>
    <style:style style:name="P14" style:family="paragraph" style:parent-style-name="Table_20_Contents">
      <style:paragraph-properties fo:text-align="center" style:justify-single-word="false"/>
      <style:text-properties officeooo:rsid="00026356" officeooo:paragraph-rsid="00026356"/>
    </style:style>
    <style:style style:name="P15" style:family="paragraph" style:parent-style-name="Table_20_Contents">
      <style:paragraph-properties fo:text-align="center" style:justify-single-word="false"/>
      <style:text-properties officeooo:rsid="00026356" officeooo:paragraph-rsid="0003d955"/>
    </style:style>
    <style:style style:name="P16" style:family="paragraph" style:parent-style-name="Table_20_Contents">
      <style:paragraph-properties fo:text-align="center" style:justify-single-word="false"/>
      <style:text-properties officeooo:rsid="0003d955" officeooo:paragraph-rsid="0003d955"/>
    </style:style>
    <style:style style:name="P17" style:family="paragraph" style:parent-style-name="Table_20_Contents">
      <style:paragraph-properties fo:text-align="center" style:justify-single-word="false"/>
      <style:text-properties officeooo:rsid="0005d006" officeooo:paragraph-rsid="0005d006"/>
    </style:style>
    <style:style style:name="P18" style:family="paragraph" style:parent-style-name="Table_20_Contents">
      <style:paragraph-properties fo:text-align="center" style:justify-single-word="false"/>
      <style:text-properties officeooo:rsid="0006d5e7" officeooo:paragraph-rsid="0006d5e7"/>
    </style:style>
    <style:style style:name="P19" style:family="paragraph" style:parent-style-name="Text_20_body">
      <style:paragraph-properties fo:text-align="center" style:justify-single-word="false"/>
      <style:text-properties officeooo:rsid="00011c3c" officeooo:paragraph-rsid="00011c3c"/>
    </style:style>
    <style:style style:name="P20" style:family="paragraph" style:parent-style-name="Text_20_body">
      <style:paragraph-properties fo:text-align="center" style:justify-single-word="false"/>
      <style:text-properties officeooo:paragraph-rsid="00011c3c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0026356"/>
    </style:style>
    <style:style style:name="P23" style:family="paragraph" style:parent-style-name="Text_20_body">
      <style:paragraph-properties fo:text-align="center" style:justify-single-word="false"/>
      <style:text-properties officeooo:paragraph-rsid="0003d955"/>
    </style:style>
    <style:style style:name="P24" style:family="paragraph" style:parent-style-name="Text_20_body">
      <style:paragraph-properties fo:text-align="start" style:justify-single-word="false"/>
      <style:text-properties officeooo:rsid="00041f0b" officeooo:paragraph-rsid="00041f0b"/>
    </style:style>
    <style:style style:name="P25" style:family="paragraph" style:parent-style-name="Text_20_body">
      <style:text-properties officeooo:paragraph-rsid="00041f0b"/>
    </style:style>
    <style:style style:name="P26" style:family="paragraph" style:parent-style-name="Text_20_body">
      <style:text-properties officeooo:rsid="0004c4f4" officeooo:paragraph-rsid="0004c4f4"/>
    </style:style>
    <style:style style:name="T1" style:family="text">
      <style:text-properties officeooo:rsid="00011c3c"/>
    </style:style>
    <style:style style:name="T2" style:family="text">
      <style:text-properties officeooo:rsid="00026356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3d955" style:font-size-asian="11pt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Noto Sans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officeooo:rsid="0003d955"/>
    </style:style>
    <style:style style:name="T7" style:family="text">
      <style:text-properties officeooo:rsid="00041f0b"/>
    </style:style>
    <style:style style:name="T8" style:family="text">
      <style:text-properties fo:color="#3465a4" loext:opacity="100%" fo:font-weight="bold" style:font-weight-asian="bold" style:font-weight-complex="bold"/>
    </style:style>
    <style:style style:name="T9" style:family="text">
      <style:text-properties officeooo:rsid="0005253a"/>
    </style:style>
    <style:style style:name="T10" style:family="text">
      <style:text-properties officeooo:rsid="00072e0c"/>
    </style:style>
    <style:style style:name="T11" style:family="text">
      <style:text-properties officeooo:rsid="0007f139"/>
    </style:style>
    <style:style style:name="T12" style:family="text">
      <style:text-properties officeooo:rsid="000a7b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ses de Datos Relacionales – Módulo 4</text:h>
      <text:p text:style-name="P24"><text:span text:style-name="T8">Coder name:</text:span> Efrain Hadid Martinez Candanoza</text:p>
      <text:p text:style-name="P24"><text:span text:style-name="T8">Clan:</text:span> magdalena</text:p>
      <text:h text:style-name="P7" text:outline-level="2">Description: </text:h>
      <text:p text:style-name="P26">The project is riwi data base, this company handles marketing and distribution of inputs at the national level</text:p>
      <text:h text:style-name="Heading_20_2" text:outline-level="2">1. Análisis y normalización:</text:h>
      <text:p text:style-name="P25"><text:span text:style-name="T7">1. I see data repeat so i divided diferents entidades in diferents columns for no repeat date and that is the principal problem about the data base, also add table pivot because if i can’t join all the data base. </text:span></text:p>
      <text:h text:style-name="P3" text:outline-level="2"><text:span text:style-name="T2">riwi_</text:span><text:span text:style-name="T1">product </text:span></text:h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B" table:number-columns-repeated="2"/>
        <table:table-row>
          <table:table-cell table:style-name="Tabla1.A1" office:value-type="string">
            <text:p text:style-name="P11">id_product</text:p>
          </table:table-cell>
          <table:table-cell table:style-name="Tabla1.A1" office:value-type="string">
            <text:p text:style-name="P11">name<text:span text:style-name="T11">_product</text:span></text:p>
          </table:table-cell>
          <table:table-cell table:style-name="Tabla1.A1" office:value-type="string">
            <text:p text:style-name="P17">id_category</text:p>
          </table:table-cell>
          <table:table-cell table:style-name="Tabla1.A1" office:value-type="string">
            <text:p text:style-name="P11">unit_price</text:p>
          </table:table-cell>
          <table:table-cell table:style-name="Tabla1.A1" office:value-type="string">
            <text:p text:style-name="P11">created_at</text:p>
          </table:table-cell>
          <table:table-cell table:style-name="Tabla1.F1" office:value-type="string">
            <text:p text:style-name="P11">update_at</text:p>
          </table:table-cell>
        </table:table-row>
        <table:table-row>
          <table:table-cell table:style-name="Tabla1.A2" office:value-type="string">
            <text:p text:style-name="P11">PK</text:p>
          </table:table-cell>
          <table:table-cell table:style-name="Tabla1.A2" office:value-type="string">
            <text:p text:style-name="P11">VARCHAR(100)</text:p>
          </table:table-cell>
          <table:table-cell table:style-name="Tabla1.A2" office:value-type="string">
            <text:p text:style-name="P17">FK</text:p>
          </table:table-cell>
          <table:table-cell table:style-name="Tabla1.A2" office:value-type="string">
            <text:p text:style-name="P11">DECIMAL</text:p>
          </table:table-cell>
          <table:table-cell table:style-name="Tabla1.A2" office:value-type="string">
            <text:p text:style-name="P11">TIMESTAMP</text:p>
          </table:table-cell>
          <table:table-cell table:style-name="Tabla1.F2" office:value-type="string">
            <text:p text:style-name="P11">TIMESTAMP</text:p>
          </table:table-cell>
        </table:table-row>
      </table:table>
      <text:p text:style-name="P20"/>
      <text:h text:style-name="P4" text:outline-level="2"><text:span text:style-name="T2">riwi_</text:span>category</text:h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1">id_category</text:p>
          </table:table-cell>
          <table:table-cell table:style-name="Tabla2.A1" office:value-type="string">
            <text:p text:style-name="P11">name<text:span text:style-name="T10">_category</text:span></text:p>
          </table:table-cell>
          <table:table-cell table:style-name="Tabla2.A1" office:value-type="string">
            <text:p text:style-name="P11">created_at</text:p>
          </table:table-cell>
          <table:table-cell table:style-name="Tabla2.D1" office:value-type="string">
            <text:p text:style-name="P11">update_at</text:p>
          </table:table-cell>
        </table:table-row>
        <table:table-row>
          <table:table-cell table:style-name="Tabla2.A2" office:value-type="string">
            <text:p text:style-name="P11">PK</text:p>
          </table:table-cell>
          <table:table-cell table:style-name="Tabla2.A2" office:value-type="string">
            <text:p text:style-name="P11">VARCHAR(100)</text:p>
          </table:table-cell>
          <table:table-cell table:style-name="Tabla2.A2" office:value-type="string">
            <text:p text:style-name="P11">TIMESTAMP</text:p>
          </table:table-cell>
          <table:table-cell table:style-name="Tabla2.D2" office:value-type="string">
            <text:p text:style-name="P11">TIMESTAMP</text:p>
          </table:table-cell>
        </table:table-row>
      </table:table>
      <text:p text:style-name="P20"/>
      <text:h text:style-name="P2" text:outline-level="2"><text:span text:style-name="T2">riwi_</text:span><text:span text:style-name="T1">c</text:span>ity</text:h>
      <table:table table:name="Tabla4" table:style-name="Tabla4">
        <table:table-column table:style-name="Tabla4.A" table:number-columns-repeated="4"/>
        <table:table-row table:style-name="Tabla4.1">
          <table:table-cell table:style-name="Tabla4.A1" office:value-type="string">
            <text:p text:style-name="P14">id_city</text:p>
          </table:table-cell>
          <table:table-cell table:style-name="Tabla4.A1" office:value-type="string">
            <text:p text:style-name="P14">name_city</text:p>
          </table:table-cell>
          <table:table-cell table:style-name="Tabla4.A1" office:value-type="string">
            <text:p text:style-name="P14">created_at</text:p>
          </table:table-cell>
          <table:table-cell table:style-name="Tabla4.D1" office:value-type="string">
            <text:p text:style-name="P14">update_at</text:p>
          </table:table-cell>
        </table:table-row>
        <table:table-row>
          <table:table-cell table:style-name="Tabla4.A2" office:value-type="string">
            <text:p text:style-name="P14">PK</text:p>
          </table:table-cell>
          <table:table-cell table:style-name="Tabla4.A2" office:value-type="string">
            <text:p text:style-name="P12">VARCHAR(100)</text:p>
          </table:table-cell>
          <table:table-cell table:style-name="Tabla4.A2" office:value-type="string">
            <text:p text:style-name="P12">TIMESTAMP</text:p>
          </table:table-cell>
          <table:table-cell table:style-name="Tabla4.D2" office:value-type="string">
            <text:p text:style-name="P12">TIMESTAMP</text:p>
          </table:table-cell>
        </table:table-row>
      </table:table>
      <text:p text:style-name="P21"/>
      <text:h text:style-name="P2" text:outline-level="2"><text:span text:style-name="T2">riwi_</text:span>supplier</text:h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1">id_supplier</text:p>
          </table:table-cell>
          <table:table-cell table:style-name="Tabla3.A1" office:value-type="string">
            <text:p text:style-name="P11">name_supplier</text:p>
          </table:table-cell>
          <table:table-cell table:style-name="Tabla3.A1" office:value-type="string">
            <text:p text:style-name="P11">id_city</text:p>
          </table:table-cell>
          <table:table-cell table:style-name="Tabla3.A1" office:value-type="string">
            <text:p text:style-name="P11">created_at</text:p>
          </table:table-cell>
          <table:table-cell table:style-name="Tabla3.E1" office:value-type="string">
            <text:p text:style-name="P11">update_at</text:p>
          </table:table-cell>
        </table:table-row>
        <table:table-row>
          <table:table-cell table:style-name="Tabla3.A2" office:value-type="string">
            <text:p text:style-name="P11">PK</text:p>
          </table:table-cell>
          <table:table-cell table:style-name="Tabla3.A2" office:value-type="string">
            <text:p text:style-name="P11">VARCHAR(100)</text:p>
          </table:table-cell>
          <table:table-cell table:style-name="Tabla3.A2" office:value-type="string">
            <text:p text:style-name="P11">FK</text:p>
          </table:table-cell>
          <table:table-cell table:style-name="Tabla3.A2" office:value-type="string">
            <text:p text:style-name="P11">TIMESTAMP</text:p>
          </table:table-cell>
          <table:table-cell table:style-name="Tabla3.E2" office:value-type="string">
            <text:p text:style-name="P11">TIMESTAMP</text:p>
          </table:table-cell>
        </table:table-row>
      </table:table>
      <text:p text:style-name="P19"/>
      <text:p text:style-name="P19"/>
      <text:p text:style-name="P19"/>
      <text:h text:style-name="P2" text:outline-level="2"><text:soft-page-break/>riwi_ware_house</text:h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14">id_ware<text:span text:style-name="T9">_</text:span>house</text:p>
          </table:table-cell>
          <table:table-cell table:style-name="Tabla5.A1" office:value-type="string">
            <text:p text:style-name="P14">name_riwi_ware_house</text:p>
          </table:table-cell>
          <table:table-cell table:style-name="Tabla5.A1" office:value-type="string">
            <text:p text:style-name="P14">id_city</text:p>
          </table:table-cell>
          <table:table-cell table:style-name="Tabla5.A1" office:value-type="string">
            <text:p text:style-name="P14">created_at</text:p>
          </table:table-cell>
          <table:table-cell table:style-name="Tabla5.E1" office:value-type="string">
            <text:p text:style-name="P14">update_at</text:p>
          </table:table-cell>
        </table:table-row>
        <table:table-row>
          <table:table-cell table:style-name="Tabla5.A2" office:value-type="string">
            <text:p text:style-name="P12">PK</text:p>
          </table:table-cell>
          <table:table-cell table:style-name="Tabla5.A2" office:value-type="string">
            <text:p text:style-name="P12">VARCHAR(100)</text:p>
          </table:table-cell>
          <table:table-cell table:style-name="Tabla5.A2" office:value-type="string">
            <text:p text:style-name="P12">FK</text:p>
          </table:table-cell>
          <table:table-cell table:style-name="Tabla5.A2" office:value-type="string">
            <text:p text:style-name="P12">TIMESTAMP</text:p>
          </table:table-cell>
          <table:table-cell table:style-name="Tabla5.E2" office:value-type="string">
            <text:p text:style-name="P12">TIMESTAMP</text:p>
          </table:table-cell>
        </table:table-row>
      </table:table>
      <text:p text:style-name="P21"/>
      <text:h text:style-name="P2" text:outline-level="2"><text:span text:style-name="T6">m</text:span>ovement<text:span text:style-name="T6">_t</text:span>ype</text:h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16">id_movement_type</text:p>
          </table:table-cell>
          <table:table-cell table:style-name="Tabla6.A1" office:value-type="string">
            <text:p text:style-name="P16">name_movement_type</text:p>
          </table:table-cell>
          <table:table-cell table:style-name="Tabla6.A1" office:value-type="string">
            <text:p text:style-name="P16">created_at</text:p>
          </table:table-cell>
          <table:table-cell table:style-name="Tabla6.D1" office:value-type="string">
            <text:p text:style-name="P16">update_at</text:p>
          </table:table-cell>
        </table:table-row>
        <table:table-row>
          <table:table-cell table:style-name="Tabla6.A2" office:value-type="string">
            <text:p text:style-name="P16">PK</text:p>
          </table:table-cell>
          <table:table-cell table:style-name="Tabla6.A2" office:value-type="string">
            <text:p text:style-name="P13">VARCHAR(<text:span text:style-name="T6">3</text:span>)</text:p>
          </table:table-cell>
          <table:table-cell table:style-name="Tabla6.A2" office:value-type="string">
            <text:p text:style-name="P13">TIMESTAMP</text:p>
          </table:table-cell>
          <table:table-cell table:style-name="Tabla6.D2" office:value-type="string">
            <text:p text:style-name="P13">TIMESTAMP</text:p>
          </table:table-cell>
        </table:table-row>
      </table:table>
      <text:p text:style-name="P8"/>
      <text:h text:style-name="P5" text:outline-level="2">order</text:h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row>
          <table:table-cell table:style-name="Tabla7.A1" office:value-type="string">
            <text:p text:style-name="P9" loext:marker-style-name="T5"><text:span text:style-name="T4">p</text:span><text:span text:style-name="T3">urchase</text:span><text:span text:style-name="T4">_o</text:span><text:span text:style-name="T3">rder</text:span></text:p>
          </table:table-cell>
          <table:table-cell table:style-name="Tabla7.A1" office:value-type="string">
            <text:p text:style-name="P13">id_supplier</text:p>
          </table:table-cell>
          <table:table-cell table:style-name="Tabla7.A1" office:value-type="string">
            <text:p text:style-name="P15">id_ware<text:span text:style-name="T9">_</text:span>house</text:p>
          </table:table-cell>
          <table:table-cell table:style-name="Tabla7.A1" office:value-type="string">
            <text:p text:style-name="P16">created_at</text:p>
          </table:table-cell>
          <table:table-cell table:style-name="Tabla7.E1" office:value-type="string">
            <text:p text:style-name="P16">send_at</text:p>
          </table:table-cell>
        </table:table-row>
        <table:table-row table:style-name="Tabla7.2">
          <table:table-cell table:style-name="Tabla7.A2" office:value-type="string">
            <text:p text:style-name="P16">PK</text:p>
          </table:table-cell>
          <table:table-cell table:style-name="Tabla7.A2" office:value-type="string">
            <text:p text:style-name="P16">FK</text:p>
          </table:table-cell>
          <table:table-cell table:style-name="Tabla7.A2" office:value-type="string">
            <text:p text:style-name="P16">FK</text:p>
          </table:table-cell>
          <table:table-cell table:style-name="Tabla7.A2" office:value-type="string">
            <text:p text:style-name="P13">TIMESTAMP</text:p>
          </table:table-cell>
          <table:table-cell table:style-name="Tabla7.E2" office:value-type="string">
            <text:p text:style-name="P13">TIMESTAMP</text:p>
          </table:table-cell>
        </table:table-row>
      </table:table>
      <text:p text:style-name="P22"/>
      <text:h text:style-name="P6" text:outline-level="2">order_details</text:h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row>
          <table:table-cell table:style-name="Tabla8.A1" office:value-type="string">
            <text:p text:style-name="P16">id_details</text:p>
          </table:table-cell>
          <table:table-cell table:style-name="Tabla8.A1" office:value-type="string">
            <text:p text:style-name="P10" loext:marker-style-name="T5"><text:span text:style-name="T4">p</text:span><text:span text:style-name="T3">urchase</text:span><text:span text:style-name="T4">_o</text:span><text:span text:style-name="T3">rder</text:span></text:p>
          </table:table-cell>
          <table:table-cell table:style-name="Tabla8.A1" office:value-type="string">
            <text:p text:style-name="P16">id_product</text:p>
          </table:table-cell>
          <table:table-cell table:style-name="Tabla8.A1" office:value-type="string">
            <text:p text:style-name="P16">quantity</text:p>
          </table:table-cell>
          <table:table-cell table:style-name="Tabla8.E1" office:value-type="string">
            <text:p text:style-name="P16">id_movement_type</text:p>
          </table:table-cell>
        </table:table-row>
        <table:table-row>
          <table:table-cell table:style-name="Tabla8.A2" office:value-type="string">
            <text:p text:style-name="P16">PK</text:p>
          </table:table-cell>
          <table:table-cell table:style-name="Tabla8.A2" office:value-type="string">
            <text:p text:style-name="P18">FK</text:p>
          </table:table-cell>
          <table:table-cell table:style-name="Tabla8.A2" office:value-type="string">
            <text:p text:style-name="P16">FK</text:p>
          </table:table-cell>
          <table:table-cell table:style-name="Tabla8.A2" office:value-type="string">
            <text:p text:style-name="P16">INT</text:p>
          </table:table-cell>
          <table:table-cell table:style-name="Tabla8.E2" office:value-type="string">
            <text:p text:style-name="P16">FK</text:p>
          </table:table-cell>
        </table:table-row>
      </table:table>
      <text:p text:style-name="P23"/>
      <text:p text:style-name="Text_20_body">CREATE TABLE riwi_category(</text:p>
      <text:p text:style-name="Text_20_body"><text:tab/>id_category SERIAL PRIMARY KEY,</text:p>
      <text:p text:style-name="Text_20_body"><text:tab/>name_category VARCHAR(100) UNIQUE NOT NULL,</text:p>
      <text:p text:style-name="Text_20_body"><text:tab/>created_at TIMESTAMP DEFAULT CURRENT_TIMESTAMP</text:p>
      <text:p text:style-name="Text_20_body">);</text:p>
      <text:p text:style-name="Text_20_body"/>
      <text:p text:style-name="Text_20_body">CREATE TABLE riwi_product(</text:p>
      <text:p text:style-name="Text_20_body"><text:tab/>id_product SERIAL PRIMARY KEY,</text:p>
      <text:p text:style-name="Text_20_body"><text:tab/>name_product VARCHAR(100) UNIQUE NOT NULL,</text:p>
      <text:p text:style-name="Text_20_body"><text:tab/>id_category INT NOT NULL,</text:p>
      <text:p text:style-name="Text_20_body"><text:tab/>unit_price DECIMAL(10, 2) CHECK (unit_price &gt;= 0) NOT NULL, </text:p>
      <text:p text:style-name="Text_20_body"><text:tab/>created_at TIMESTAMP DEFAULT CURRENT_TIMESTAMP,</text:p>
      <text:p text:style-name="Text_20_body"><text:tab/>CONSTRAINT fk_id_category </text:p>
      <text:p text:style-name="Text_20_body"><text:tab/><text:tab/>FOREIGN KEY (id_category)</text:p>
      <text:p text:style-name="Text_20_body"><text:soft-page-break/><text:tab/><text:tab/>REFERENCES riwi_category(id_category)</text:p>
      <text:p text:style-name="Text_20_body"><text:tab/><text:tab/>ON DELETE RESTRICT</text:p>
      <text:p text:style-name="Text_20_body"><text:tab/><text:tab/>ON UPDATE CASCADE</text:p>
      <text:p text:style-name="Text_20_body">);</text:p>
      <text:p text:style-name="Text_20_body"/>
      <text:p text:style-name="Text_20_body">CREATE TABLE riwi_city(</text:p>
      <text:p text:style-name="Text_20_body"><text:tab/>id_city SERIAL PRIMARY KEY,</text:p>
      <text:p text:style-name="Text_20_body"><text:tab/>name_city VARCHAR(100) UNIQUE NOT NULL,</text:p>
      <text:p text:style-name="Text_20_body"><text:tab/>created_at TIMESTAMP DEFAULT CURRENT_TIMESTAMP</text:p>
      <text:p text:style-name="Text_20_body">);</text:p>
      <text:p text:style-name="Text_20_body"/>
      <text:p text:style-name="Text_20_body">CREATE TABLE riwi_supplier(</text:p>
      <text:p text:style-name="Text_20_body"><text:tab/>id_supplier SERIAL PRIMARY KEY,</text:p>
      <text:p text:style-name="Text_20_body"><text:tab/>name_supplier VARCHAR(100) UNIQUE NOT NULL,</text:p>
      <text:p text:style-name="Text_20_body"><text:tab/>id_city INT NOT NULL,</text:p>
      <text:p text:style-name="Text_20_body"><text:tab/>created_at TIMESTAMP DEFAULT CURRENT_TIMESTAMP,</text:p>
      <text:p text:style-name="Text_20_body"><text:tab/>CONSTRAINT fk_id_city</text:p>
      <text:p text:style-name="Text_20_body"><text:tab/><text:tab/>FOREIGN KEY (id_city)</text:p>
      <text:p text:style-name="Text_20_body"><text:tab/><text:tab/>REFERENCES riwi_city(id_city)</text:p>
      <text:p text:style-name="Text_20_body"><text:tab/><text:tab/>ON DELETE RESTRICT</text:p>
      <text:p text:style-name="Text_20_body"><text:tab/><text:tab/>ON UPDATE CASCADE</text:p>
      <text:p text:style-name="Text_20_body">);</text:p>
      <text:p text:style-name="Text_20_body"/>
      <text:p text:style-name="Text_20_body">CREATE TABLE riwi_ware_house(</text:p>
      <text:p text:style-name="Text_20_body"><text:tab/>id_ware_house SERIAL PRIMARY KEY,</text:p>
      <text:p text:style-name="Text_20_body"><text:tab/>name_riwi_ware_house VARCHAR(100) UNIQUE NOT NULL,</text:p>
      <text:p text:style-name="Text_20_body"><text:tab/>id_city INT NOT NULL,</text:p>
      <text:p text:style-name="Text_20_body"><text:tab/>created_at TIMESTAMP DEFAULT CURRENT_TIMESTAMP,</text:p>
      <text:p text:style-name="Text_20_body"><text:tab/>CONSTRAINT fk_id_city</text:p>
      <text:p text:style-name="Text_20_body"><text:tab/><text:tab/>FOREIGN KEY (id_city)</text:p>
      <text:p text:style-name="Text_20_body"><text:tab/><text:tab/>REFERENCES riwi_city(id_city)</text:p>
      <text:p text:style-name="Text_20_body"><text:tab/><text:tab/>ON DELETE RESTRICT</text:p>
      <text:p text:style-name="Text_20_body"><text:soft-page-break/><text:tab/><text:tab/>ON UPDATE CASCADE</text:p>
      <text:p text:style-name="Text_20_body">);</text:p>
      <text:p text:style-name="Text_20_body"/>
      <text:p text:style-name="Text_20_body">CREATE TABLE movement_type(</text:p>
      <text:p text:style-name="Text_20_body"><text:tab/>id_movement_type SERIAL PRIMARY KEY,</text:p>
      <text:p text:style-name="Text_20_body"><text:tab/>name_movement_type VARCHAR(3) UNIQUE,</text:p>
      <text:p text:style-name="Text_20_body"><text:tab/>created_at TIMESTAMP DEFAULT CURRENT_TIMESTAMP</text:p>
      <text:p text:style-name="Text_20_body">);</text:p>
      <text:p text:style-name="Text_20_body"/>
      <text:p text:style-name="Text_20_body">CREATE TABLE order_c (</text:p>
      <text:p text:style-name="Text_20_body"><text:tab/>purchase_order SERIAL PRIMARY KEY,</text:p>
      <text:p text:style-name="Text_20_body"><text:tab/>id_supplier INT NOT NULL,</text:p>
      <text:p text:style-name="Text_20_body"><text:tab/>id_ware_house INT NOT NULL,</text:p>
      <text:p text:style-name="Text_20_body"><text:tab/>created_at TIMESTAMP DEFAULT CURRENT_TIMESTAMP,</text:p>
      <text:p text:style-name="Text_20_body"><text:tab/>movement_date TIMESTAMP</text:p>
      <text:p text:style-name="Text_20_body">);</text:p>
      <text:p text:style-name="Text_20_body"/>
      <text:p text:style-name="Text_20_body">CREATE TABLE order_details (</text:p>
      <text:p text:style-name="Text_20_body"><text:tab/>id_details SERIAL PRIMARY KEY,</text:p>
      <text:p text:style-name="Text_20_body"><text:tab/>purchase_order INT NOT NULL,</text:p>
      <text:p text:style-name="Text_20_body"><text:tab/>id_product INT NOT NULL,</text:p>
      <text:p text:style-name="Text_20_body"><text:tab/>quantity INT NOT NULL,</text:p>
      <text:p text:style-name="Text_20_body"><text:tab/>id_movement_type INT NOT NULL,</text:p>
      <text:p text:style-name="Text_20_body"><text:tab/>CONSTRAINT fk_purchase_order</text:p>
      <text:p text:style-name="Text_20_body"><text:tab/><text:tab/>FOREIGN KEY(purchase_order)</text:p>
      <text:p text:style-name="Text_20_body"><text:tab/><text:tab/>REFERENCES order_c(purchase_order)</text:p>
      <text:p text:style-name="Text_20_body"><text:tab/><text:tab/>ON DELETE RESTRICT</text:p>
      <text:p text:style-name="Text_20_body"><text:tab/><text:tab/>ON UPDATE CASCADE</text:p>
      <text:p text:style-name="Text_20_body">);</text:p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5. Manipulación de datos:</text:h>
      <text:p text:style-name="Text_20_body">Registrar un nuevo proveedor y producto asociado:</text:p>
      <text:p text:style-name="Text_20_body">INSERT INTO riwi_ware_house (name_riwi_ware_house, id_city)</text:p>
      <text:p text:style-name="Text_20_body"><text:tab/>VALUES ("nombreDelNuevoProvedor", elIdDeSuCiudad)</text:p>
      <text:p text:style-name="Text_20_body">Modificar información de un proveedor existente:</text:p>
      <text:p text:style-name="Text_20_body">UPDATE riwi_ware_house SET name_riwi_ware_house WHERE id_ware_house = 1;</text:p>
      <text:p text:style-name="Text_20_body">Eliminar un producto que no tenga movimientos asociados: <text:span text:style-name="T12">por ahora no existen un producto sin movimiento asociado pero en caso tal solo haria falta un delete y especificar la hubicacion con <text:s/>where</text:span></text:p>
      <text:p text:style-name="Text_20_body"/>
      <text:h text:style-name="Heading_20_2" text:outline-level="2">6. Consultas SQL:</text:h>
      <text:p text:style-name="Text_20_body">Consulta 1:</text:p>
      <text:p text:style-name="Text_20_body">SELECT p.name_product FROM riwi_product p</text:p>
      <text:p text:style-name="Text_20_body">ORDER BY id_product ASC </text:p>
      <text:p text:style-name="Text_20_body">Consulta 2:</text:p>
      <text:p text:style-name="Text_20_body">SELECT r.name_riwi_ware_house ,m.name_movement_type, p.name_product </text:p>
      <text:p text:style-name="Text_20_body">FROM order_details o</text:p>
      <text:p text:style-name="Text_20_body">JOIN order_c org</text:p>
      <text:p text:style-name="Text_20_body"><text:tab/>ON o.purchase_order = org.purchase_order</text:p>
      <text:p text:style-name="Text_20_body">JOIN riwi_ware_house r</text:p>
      <text:p text:style-name="Text_20_body"><text:tab/>ON org.id_supplier = r.id_ware_house</text:p>
      <text:p text:style-name="Text_20_body">JOIN movement_type m</text:p>
      <text:p text:style-name="Text_20_body"><text:tab/>ON o.id_movement_type = m.id_movement_type</text:p>
      <text:p text:style-name="Text_20_body">JOIN riwi_product p</text:p>
      <text:p text:style-name="Text_20_body"><text:tab/>ON o.id_product = p.id_product</text:p>
      <text:p text:style-name="Text_20_body">ORDER BY name_riwi_ware_house ASC 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06:29:02.538166762</meta:creation-date>
    <dc:date>2026-07-06T10:57:00.681571371</dc:date>
    <meta:editing-duration>PT7M32S</meta:editing-duration>
    <meta:editing-cycles>1</meta:editing-cycles>
    <meta:generator>LibreOffice/24.2.7.2$Linux_X86_64 LibreOffice_project/420$Build-2</meta:generator>
    <meta:document-statistic meta:table-count="8" meta:image-count="0" meta:object-count="0" meta:page-count="5" meta:paragraph-count="182" meta:word-count="501" meta:character-count="4051" meta:non-whitespace-character-count="3649"/>
  </office:meta>
</office:document-meta>
</file>